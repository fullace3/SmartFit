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956ba"/>
    </style:style>
    <style:style style:name="P2" style:family="paragraph" style:parent-style-name="Text_20_body">
      <style:text-properties fo:font-size="18pt" fo:font-weight="bold" officeooo:rsid="002956ba" officeooo:paragraph-rsid="002956ba" style:font-size-asian="15.75pt" style:font-weight-asian="bold" style:font-size-complex="18pt" style:font-weight-complex="bold"/>
    </style:style>
    <style:style style:name="P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text-properties fo:font-weight="bold" officeooo:rsid="005626ae" officeooo:paragraph-rsid="005626ae" style:font-weight-asian="bold" style:font-weight-complex="bold"/>
    </style:style>
    <style:style style:name="P5" style:family="paragraph" style:parent-style-name="Text_20_body" style:list-style-name="L1">
      <style:text-properties officeooo:paragraph-rsid="002c830e"/>
    </style:style>
    <style:style style:name="P6" style:family="paragraph" style:parent-style-name="Text_20_body" style:list-style-name="L1">
      <style:text-properties fo:font-weight="bold" officeooo:paragraph-rsid="002c830e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c830e" officeooo:paragraph-rsid="002c830e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5626ae"/>
    </style:style>
    <style:style style:name="P12" style:family="paragraph" style:parent-style-name="Text_20_body" style:list-style-name="L3">
      <style:text-properties fo:font-weight="bold" style:font-weight-asian="bold" style:font-weight-complex="bold"/>
    </style:style>
    <style:style style:name="P13" style:family="paragraph" style:parent-style-name="Text_20_body" style:list-style-name="L3">
      <style:text-properties officeooo:paragraph-rsid="0035e519"/>
    </style:style>
    <style:style style:name="P14" style:family="paragraph" style:parent-style-name="Text_20_body" style:list-style-name="L4"/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40b35a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text-properties fo:font-weight="bold" style:font-weight-asian="bold" style:font-weight-complex="bold"/>
    </style:style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7"/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 style:list-style-name="L6"/>
    <style:style style:name="P23" style:family="paragraph" style:parent-style-name="Text_20_body" style:list-style-name="L8">
      <style:text-properties fo:font-weight="bold" style:font-weight-asian="bold" style:font-weight-complex="bold"/>
    </style:style>
    <style:style style:name="P24" style:family="paragraph" style:parent-style-name="Text_20_body" style:list-style-name="L8">
      <style:text-properties fo:font-weight="normal" officeooo:rsid="002ab63a" officeooo:paragraph-rsid="002ab63a" style:font-weight-asian="normal" style:font-weight-complex="normal"/>
    </style:style>
    <style:style style:name="P25" style:family="paragraph" style:parent-style-name="Text_20_body" style:list-style-name="L8">
      <style:text-properties officeooo:paragraph-rsid="005127ac"/>
    </style:style>
    <style:style style:name="P26" style:family="paragraph" style:parent-style-name="Text_20_body" style:list-style-name="L8">
      <style:text-properties fo:font-weight="normal" style:font-weight-asian="normal" style:font-weight-complex="normal"/>
    </style:style>
    <style:style style:name="P27" style:family="paragraph" style:parent-style-name="Text_20_body" style:list-style-name="L9">
      <style:text-properties fo:font-weight="bold" style:font-weight-asian="bold" style:font-weight-complex="bold"/>
    </style:style>
    <style:style style:name="P28" style:family="paragraph" style:parent-style-name="Text_20_body" style:list-style-name="L9">
      <style:text-properties fo:font-weight="normal" style:font-weight-asian="normal" style:font-weight-complex="normal"/>
    </style:style>
    <style:style style:name="P29" style:family="paragraph" style:parent-style-name="Text_20_body" style:list-style-name="L9"/>
    <style:style style:name="P30" style:family="paragraph" style:parent-style-name="Text_20_body" style:list-style-name="L10">
      <style:text-properties fo:font-weight="bold" style:font-weight-asian="bold" style:font-weight-complex="bold"/>
    </style:style>
    <style:style style:name="P31" style:family="paragraph" style:parent-style-name="Text_20_body" style:list-style-name="L10">
      <style:text-properties fo:font-weight="normal" style:font-weight-asian="normal" style:font-weight-complex="normal"/>
    </style:style>
    <style:style style:name="P32" style:family="paragraph" style:parent-style-name="Text_20_body" style:list-style-name="L10"/>
    <style:style style:name="T1" style:family="text">
      <style:text-properties fo:font-size="18pt" fo:font-weight="bold" officeooo:rsid="002956ba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2a19ff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55fcae" style:font-size-asian="15.75pt" style:font-weight-asian="bold" style:font-size-complex="1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830e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dca16" style:font-weight-asian="normal" style:font-weight-complex="normal"/>
    </style:style>
    <style:style style:name="T7" style:family="text">
      <style:text-properties fo:font-weight="bold" officeooo:rsid="002129fd" style:font-weight-asian="bold" style:font-weight-complex="bold"/>
    </style:style>
    <style:style style:name="T8" style:family="text">
      <style:text-properties officeooo:rsid="002dca16"/>
    </style:style>
    <style:style style:name="T9" style:family="text">
      <style:text-properties fo:font-weight="normal" officeooo:rsid="002dca16" style:font-weight-asian="normal" style:font-weight-complex="normal"/>
    </style:style>
    <style:style style:name="T10" style:family="text">
      <style:text-properties fo:font-weight="normal" officeooo:rsid="002f7c3e" style:font-weight-asian="normal" style:font-weight-complex="normal"/>
    </style:style>
    <style:style style:name="T11" style:family="text">
      <style:text-properties officeooo:rsid="0031524b"/>
    </style:style>
    <style:style style:name="T12" style:family="text">
      <style:text-properties officeooo:rsid="0032c8bf"/>
    </style:style>
    <style:style style:name="T13" style:family="text">
      <style:text-properties officeooo:rsid="00342862"/>
    </style:style>
    <style:style style:name="T14" style:family="text">
      <style:text-properties officeooo:rsid="003dd600"/>
    </style:style>
    <style:style style:name="T15" style:family="text">
      <style:text-properties fo:font-weight="normal" officeooo:rsid="0040b35a" style:font-weight-asian="normal" style:font-weight-complex="normal"/>
    </style:style>
    <style:style style:name="T16" style:family="text">
      <style:text-properties officeooo:rsid="004dc541"/>
    </style:style>
    <style:style style:name="T17" style:family="text">
      <style:text-properties officeooo:rsid="004cb306"/>
    </style:style>
    <style:style style:name="T18" style:family="text">
      <style:text-properties fo:font-weight="normal" officeooo:rsid="005127ac" style:font-weight-asian="normal" style:font-weight-complex="normal"/>
    </style:style>
    <style:style style:name="T19" style:family="text">
      <style:text-properties officeooo:rsid="005127ac"/>
    </style:style>
    <text:list-style style:name="L1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ustificación del pro</text:span><text:span text:style-name="T2">j</text:span><text:span text:style-name="T1">ecto </text:span><text:span text:style-name="T3">2</text:span></text:p>
      <text:p text:style-name="P2"/>
      <text:p text:style-name="P3">Acceso a Datos</text:p>
      <text:p text:style-name="Text_20_body"/>
      <text:list text:style-name="L1">
        <text:list-item>
          <text:p text:style-name="P4">Uso de una base de datos relacional con al menos 3–4 tablas relacionadas.</text:p>
          <text:list>
            <text:list-item>
              <text:p text:style-name="P5"><text:s/>El proyecto tiene una implementación de una <text:span text:style-name="T4">base de datos relacional con </text:span><text:span text:style-name="T5">cinco</text:span><text:span text:style-name="T4"> tablas interrelacionadas:</text:span> </text:p>
              <text:list>
                <text:list-item>
                  <text:p text:style-name="P6">Usuarios: <text:span text:style-name="T5">Almacenar los datos personales de las personas que se registren.</text:span></text:p>
                </text:list-item>
                <text:list-item>
                  <text:p text:style-name="P6">Rutinas: <text:span text:style-name="T6">G</text:span><text:span text:style-name="T5">uardaran los ejercicios agrupados por rutinas que podran ser creadas por los usuarios.</text:span></text:p>
                </text:list-item>
                <text:list-item>
                  <text:p text:style-name="P5"><text:span text:style-name="T7">Ejercicios: </text:span><text:span text:style-name="T5">Almacenara todos los ejercicios para ser incluidos en las rutinas.</text:span></text:p>
                </text:list-item>
                <text:list-item>
                  <text:p text:style-name="P6">Medidas Corporales: <text:span text:style-name="T8">G</text:span><text:span text:style-name="T9">uardar la información de las medidas corporales de los usuarios.</text:span></text:p>
                </text:list-item>
                <text:list-item>
                  <text:p text:style-name="P7">Comidas: <text:span text:style-name="T9">Almacenara las comidas de los usuarios.</text:span></text:p>
                </text:list-item>
              </text:list>
            </text:list-item>
          </text:list>
          <text:p text:style-name="P8"/>
        </text:list-item>
        <text:list-item>
          <text:p text:style-name="P9">Implementación de operaciones CRUD (crear, leer, actualizar y borrar).</text:p>
          <text:list>
            <text:list-item>
              <text:p text:style-name="P8">El proyecto implica la gestión de datos del usuario, incluyendo detalles de sus rutinas de ejercicio, el registro de su alimentación, sus medidas corporales, y un historial de actividad física, lo cual exige la capacidad de Crear, Leer, Actualizar y Borrar esta información en la base de datos.</text:p>
            </text:list-item>
          </text:list>
        </text:list-item>
      </text:list>
      <text:p text:style-name="Text_20_body"/>
      <text:list xml:id="list164721059340881" text:continue-numbering="true" text:style-name="L1">
        <text:list-item>
          <text:p text:style-name="P9">Posibilidad de importar o exportar datos en formato JSON o XML.</text:p>
          <text:list>
            <text:list-item>
              <text:p text:style-name="P8">Los informes se generarán a partir de los datos almacenados en la base de datos, con el objetivo de ofrecer al usuario una <text:span text:style-name="Strong_20_Emphasis"><text:span text:style-name="T10">visión de su progreso</text:span></text:span>.<text:line-break/>Los principales informes serán:</text:p>
              <text:list text:style-name="L2">
                <text:list-item>
                  <text:p text:style-name="P10"><text:span text:style-name="Strong_20_Emphasis">Informe de evolución física:</text:span> <text:span text:style-name="T11">M</text:span>ostrará gráficas con la variación del peso y medidas a lo largo del tiempo.</text:p>
                </text:list-item>
                <text:list-item>
                  <text:p text:style-name="P11"><text:span text:style-name="Strong_20_Emphasis">Informe de actividad y entrenamientos:</text:span> <text:span text:style-name="T11">I</text:span>ncluirá estadísticas sobre la frecuencia de los entrenamientos, el número de rutinas completadas y el tipo de ejercicios más realizados.</text:p>
                </text:list-item>
                <text:list-item>
                  <text:p text:style-name="P10"><text:span text:style-name="Strong_20_Emphasis">Informe nutricional:</text:span> <text:span text:style-name="T12">R</text:span>eflejará <text:span text:style-name="T13">las</text:span> calorías consumidas, así como la proporción de macronutrientes en la dieta.</text:p>
                </text:list-item>
              </text:list>
              <text:p text:style-name="P8"/>
            </text:list-item>
          </text:list>
        </text:list-item>
      </text:list>
      <text:p text:style-name="Text_20_body"/>
      <text:p text:style-name="P3"><text:soft-page-break/>Desarrollo de Interfaces</text:p>
      <text:p text:style-name="Text_20_body"/>
      <text:list xml:id="list2109618284" text:style-name="L3">
        <text:list-item>
          <text:p text:style-name="P12">Una interfaz gráfica de usuario (GUI) clara, usable y accesible.</text:p>
          <text:list>
            <text:list-item>
              <text:p text:style-name="P13"><text:span text:style-name="T4">La aplicación contará con una </text:span><text:span text:style-name="Strong_20_Emphasis"><text:span text:style-name="T4">interfaz gráfica, intuitiva y centrada en la experiencia del usuario</text:span></text:span><text:span text:style-name="T4">, diseñada para facilitar el seguimiento diario del entrenamiento, la alimentación y las medidas corporales. </text:span></text:p>
            </text:list-item>
            <text:list-item>
              <text:p text:style-name="P13">La<text:span text:style-name="T4"> </text:span><text:span text:style-name="Strong_20_Emphasis"><text:span text:style-name="T4">pantalla principal</text:span></text:span><text:span text:style-name="T4"> se presentará como un </text:span><text:span text:style-name="Strong_20_Emphasis"><text:span text:style-name="T4">calendario</text:span></text:span><text:span text:style-name="T4">, donde el usuario podrá visualizar los </text:span><text:span text:style-name="Strong_20_Emphasis"><text:span text:style-name="T4">días de entrenamiento realizados y los planificados</text:span></text:span><text:span text:style-name="T4">, así como acceder rápidamente a la información de cada jornada.</text:span></text:p>
            </text:list-item>
          </text:list>
        </text:list-item>
      </text:list>
      <text:p text:style-name="Text_20_body"><text:tab/>Además, la interfaz se organizará en<text:span text:style-name="T4"> </text:span><text:span text:style-name="Strong_20_Emphasis"><text:span text:style-name="T4">diferentes secciones especializadas</text:span></text:span><text:span text:style-name="T4">:</text:span></text:p>
      <text:list text:style-name="L4">
        <text:list-item>
          <text:list>
            <text:list-item>
              <text:p text:style-name="P14"><text:span text:style-name="Strong_20_Emphasis">Medidas corporales:</text:span> una pantalla dedicada al registro y seguimiento de las medidas, con gráficos que muestren la evolución física a lo largo del tiempo.</text:p>
            </text:list-item>
            <text:list-item>
              <text:p text:style-name="P14"><text:span text:style-name="Strong_20_Emphasis">Comidas:</text:span> un espacio para registrar los alimentos consumidos cada día, calcular las calorías y controlar el equilibrio nutricional.</text:p>
            </text:list-item>
            <text:list-item>
              <text:p text:style-name="P14"><text:span text:style-name="Strong_20_Emphasis">Gestión de rutinas:</text:span> una sección que permitirá <text:span text:style-name="Strong_20_Emphasis"><text:span text:style-name="T4">editar, añadir o modificar rutinas y ejercicios</text:span></text:span> de forma centralizada, facilitando cambios rápidos y globales en el plan de entrenamiento.</text:p>
            </text:list-item>
          </text:list>
        </text:list-item>
      </text:list>
      <text:p text:style-name="Text_20_body"><text:tab/>El diseño <text:span text:style-name="T14">tendrá </text:span>una distribución clara, iconografía intuitiva y colores contrastados que <text:tab/>garanticen la legibilidad. Su objetivo es ofrecer una experiencia fluida, que ayude al usuario <text:tab/>a mantener un control constante de su progreso físico y nutricional.</text:p>
      <text:p text:style-name="Text_20_body"/>
      <text:list text:continue-list="list2109618284" text:style-name="L3">
        <text:list-item>
          <text:p text:style-name="P12">Inclusión de formularios y menús coherentes, con validación básica.</text:p>
          <text:list>
            <text:list-item>
              <text:p text:style-name="P15">La aplicación dispondrá de <text:span text:style-name="Strong_20_Emphasis"><text:span text:style-name="T4">formularios simple</text:span></text:span><text:span text:style-name="Strong_20_Emphasis"><text:span text:style-name="T15">s</text:span></text:span> para introducir datos en cada módulo: registro de comidas, creación de rutinas y actualización de medidas corporales.</text:p>
            </text:list-item>
            <text:list-item>
              <text:p text:style-name="P16">Cada formulario incorporará <text:span text:style-name="Strong_20_Emphasis"><text:span text:style-name="T4">validaciones básicas</text:span></text:span><text:span text:style-name="T4">,</text:span> como la comprobación de campos obligatorios, el formato correcto de los datos y la prevención de errores de entrada. </text:p>
            </text:list-item>
            <text:list-item>
              <text:p text:style-name="P16">Los <text:span text:style-name="Strong_20_Emphasis"><text:span text:style-name="T4">menús</text:span></text:span><text:span text:style-name="T4"> seguirán una estructura coherente entre secciones, con botones y opciones situados en lugares familiares para el usuario, favoreciendo la rapidez de <text:tab/>uso y reduciendo la curva de aprendizaje. Esta coherencia entre menús, formularios y pantallas permitirá una interacción más </text:span><text:span text:style-name="Strong_20_Emphasis"><text:span text:style-name="T4">natural, segura y eficiente</text:span></text:span><text:span text:style-name="T4">.</text:span></text:p>
              <text:p text:style-name="P15"/>
            </text:list-item>
          </text:list>
        </text:list-item>
      </text:list>
      <text:p text:style-name="Text_20_body"/>
      <text:list xml:id="list164719306180562" text:continue-numbering="true" text:style-name="L3">
        <text:list-item>
          <text:p text:style-name="P12">Generación de al menos un informe con gráficos a partir de los datos almacenados.</text:p>
          <text:list>
            <text:list-item>
              <text:p text:style-name="P15"><text:s/>La aplicación generará informes que mostrarán de manera visual el progreso de cada usuario en el gimnasio. Por ejemplo:</text:p>
            </text:list-item>
            <text:list-item text:style-override="L5">
              <text:p text:style-name="P17"><text:soft-page-break/><text:span text:style-name="Strong_20_Emphasis">Gráfico de barras o columnas:</text:span> Para comparar los pesos levantados y las repeticiones realizadas en distintos ejercicios a lo largo del tiempo.</text:p>
            </text:list-item>
            <text:list-item text:style-override="L5">
              <text:p text:style-name="P17"><text:span text:style-name="Strong_20_Emphasis">Gráfico de línea:</text:span> Para observar la evolución del rendimiento en un ejercicio específico, mostrando cómo aumentan los pesos o las repeticiones semana a semana.</text:p>
            </text:list-item>
            <text:list-item text:style-override="L5">
              <text:p text:style-name="P17"><text:span text:style-name="Strong_20_Emphasis">Gráficos combinados:</text:span> Se pueden incluir tanto pesos como repeticiones en un mismo gráfico, facilitando la comparación y análisis del rendimiento general.</text:p>
            </text:list-item>
          </text:list>
        </text:list-item>
      </text:list>
      <text:p text:style-name="Text_20_body"><text:tab/>De esta manera, los usuarios podrán ver claramente cómo avanzan en sus entrenamientos y <text:tab/>ajustar sus rutinas según su progreso.</text:p>
      <text:p text:style-name="Text_20_body"/>
      <text:p text:style-name="Text_20_body"/>
      <text:p text:style-name="Text_20_body"/>
      <text:p text:style-name="P3">Programación Multimedia y Móviles</text:p>
      <text:p text:style-name="P3"/>
      <text:list xml:id="list2755131208" text:style-name="L6">
        <text:list-item>
          <text:p text:style-name="P18">El proyecto debe ser ejecutable en PC y de una versión móvil (o diseño adaptable).</text:p>
          <text:list>
            <text:list-item>
              <text:p text:style-name="P19">El proyecto estará diseñado para ser <text:span text:style-name="Strong_20_Emphasis"><text:span text:style-name="T4">ejecutable en PC</text:span></text:span> y contará también con una <text:span text:style-name="Strong_20_Emphasis"><text:span text:style-name="T4">versión móvil</text:span></text:span>, de manera que los usuarios puedan acceder y registrar sus entrenamientos desde cualquier dispositivo.</text:p>
              <text:list text:style-name="L7">
                <text:list-item>
                  <text:p text:style-name="P20"><text:span text:style-name="Strong_20_Emphasis">Versión para PC:</text:span> Permitirá un uso completo de la aplicación, incluyendo ingreso de datos, generación de informes y visualización de gráficos de progreso en pantalla grande.</text:p>
                </text:list-item>
                <text:list-item>
                  <text:p text:style-name="P20"><text:span text:style-name="Strong_20_Emphasis">Versión móvil:</text:span> El diseño será responsive, ajustándose automáticamente a pantallas de <text:span text:style-name="T16">moviles</text:span> y tablets, para que los usuarios puedan registrar sus entrenamientos, consultar gráficos y revisar su progreso de forma cómoda y rápida mientras están en el gimnasio o fuera de él.</text:p>
                </text:list-item>
              </text:list>
            </text:list-item>
          </text:list>
        </text:list-item>
      </text:list>
      <text:p text:style-name="Text_20_body"><text:tab/><text:tab/>Est<text:span text:style-name="T17">o</text:span> asegura que la aplicación sea accesible y útil tanto en el hogar como en el <text:tab/><text:tab/><text:tab/>gimnasio, ofreciendo la misma funcionalidad principal en cualquier dispositivo.</text:p>
      <text:p text:style-name="P21"/>
      <text:p text:style-name="P21"/>
      <text:list text:continue-numbering="true" text:style-name="L6">
        <text:list-item>
          <text:p text:style-name="P18">Uso de funcionalidades multimedia (ejemplo: visualización de imágenes, exportación a PDF, mapas interactivos).</text:p>
          <text:list>
            <text:list-item>
              <text:p text:style-name="P22">El proyecto incluye la <text:span text:style-name="T4">visualización de Informes y Gráficos y un Panel de Control que mostrará un resumen del progreso del usuario, ambos elementos de carácter visual.</text:span></text:p>
            </text:list-item>
          </text:list>
        </text:list-item>
      </text:list>
      <text:p text:style-name="P21"/>
      <text:list text:continue-numbering="true" text:style-name="L6">
        <text:list-item>
          <text:p text:style-name="P18">Soporte de conexión HTTPS si requiere acceso a servicios externos.</text:p>
          <text:list>
            <text:list-item>
              <text:p text:style-name="P22"><text:soft-page-break/><text:span text:style-name="T4">La aplicación garantiza la protección de los datos de los usuarios mediante </text:span><text:span text:style-name="Strong_20_Emphasis"><text:span text:style-name="T4">cifrado de contraseñas</text:span></text:span><text:span text:style-name="T4"> y medidas de seguridad en la comunicación cliente-servidor. Esto asegura que, en caso de que la aplicación necesite acceder a </text:span><text:span text:style-name="Strong_20_Emphasis"><text:span text:style-name="T4">servicios externos</text:span></text:span><text:span text:style-name="T4">, la información sensible, incluyendo credenciales de usuario, viaje de manera segura y cifrada.</text:span></text:p>
            </text:list-item>
            <text:list-item>
              <text:p text:style-name="P22"><text:span text:style-name="T4">El uso de </text:span><text:span text:style-name="Strong_20_Emphasis"><text:span text:style-name="T4">protocolos seguros</text:span></text:span><text:span text:style-name="T4"> como HTTPS protege la transmisión de datos hacia y desde servicios externos, evitando que puedan ser interceptados o manipulados. De esta manera, la aplicación cumple con los estándares básicos de seguridad y mantiene la confidencialidad de la información del usuario.</text:span></text:p>
            </text:list-item>
          </text:list>
        </text:list-item>
      </text:list>
      <text:p text:style-name="Text_20_body"/>
      <text:p text:style-name="Text_20_body"/>
      <text:p text:style-name="P3">Programación de Servicios y Procesos</text:p>
      <text:p text:style-name="P3"/>
      <text:list text:style-name="L8">
        <text:list-item>
          <text:p text:style-name="P23">El sistema debe implementar un servicio en red o un mecanismo de comunicación cliente-servidor (por ejemplo: API REST sencilla).</text:p>
          <text:list>
            <text:list-item>
              <text:p text:style-name="P24">La aplicación incluira una API sencilla para que entrenadores personales puedan introducir rutinas personalizadas para sus clientes.</text:p>
            </text:list-item>
          </text:list>
        </text:list-item>
      </text:list>
      <text:p text:style-name="P21"/>
      <text:list text:continue-numbering="true" text:style-name="L8">
        <text:list-item>
          <text:p text:style-name="P23">Gestión de procesos o hilos para tareas en segundo plano (ej.: notificaciones, actualización periódica de datos).</text:p>
          <text:list>
            <text:list-item>
              <text:p text:style-name="P25"><text:span text:style-name="T18">L</text:span><text:span text:style-name="T19">a aplicación usará procesos en segundo plano para realizar tareas automáticas, </text:span><text:span text:style-name="T4">como </text:span><text:span text:style-name="Strong_20_Emphasis"><text:span text:style-name="T4">enviar recordatorios y notificaciones</text:span></text:span><text:span text:style-name="T4"> al usuario.<text:line-break/>Por ejemplo, el sistema podrá </text:span><text:span text:style-name="Strong_20_Emphasis"><text:span text:style-name="T4">avisar al usuario cuando sea hora de entrenar</text:span></text:span><text:span text:style-name="T4"> o </text:span><text:span text:style-name="Strong_20_Emphasis"><text:span text:style-name="T4">recordarle que registre sus comidas o progresos</text:span></text:span><text:span text:style-name="T4">.</text:span><text:span text:style-name="T19"><text:line-break/>De esta forma, la aplicación sigue funcionando aunque el usuario no la tenga abierta, mejorando la experiencia y la constancia en el seguimiento del entrenamiento.</text:span></text:p>
            </text:list-item>
          </text:list>
        </text:list-item>
      </text:list>
      <text:p text:style-name="P21"/>
      <text:list text:continue-numbering="true" text:style-name="L8">
        <text:list-item>
          <text:p text:style-name="P23">Aplicación de criterios básicos de seguridad (roles de usuario, cifrado de contraseñas, comunicaciones seguras).</text:p>
          <text:list>
            <text:list-item>
              <text:p text:style-name="P26">Para proteger la información de los usuarios, la aplicación guardará las <text:span text:style-name="Strong_20_Emphasis"><text:span text:style-name="T4">contraseñas de forma cifrada</text:span></text:span> y no en texto plano.<text:line-break/>También se implementará un <text:span text:style-name="Strong_20_Emphasis"><text:span text:style-name="T4">sistema de roles</text:span></text:span>, que permitirá diferenciar entre usuarios normales y entrenadores, limitando las acciones que cada uno puede realizar.<text:line-break/>Además, cuando la aplicación se comunique con el servidor o con otros servicios, se usarán <text:span text:style-name="Strong_20_Emphasis"><text:span text:style-name="T4">canales seguros de comunicación</text:span></text:span> para evitar que los datos puedan ser interceptados.</text:p>
              <text:p text:style-name="P26"/>
            </text:list-item>
          </text:list>
        </text:list-item>
      </text:list>
      <text:p text:style-name="P21"><text:soft-page-break/></text:p>
      <text:p text:style-name="P21"/>
      <text:p text:style-name="P3">Sistemas de Gestión Empresarial</text:p>
      <text:p text:style-name="P3"/>
      <text:list text:style-name="L9">
        <text:list-item>
          <text:p text:style-name="P27">Control de usuarios/clientes.</text:p>
          <text:list>
            <text:list-item>
              <text:p text:style-name="P28">La aplicación permitirá <text:span text:style-name="Strong_20_Emphasis"><text:span text:style-name="T4">registrar, iniciar sesión y gestionar usuarios</text:span></text:span>, diferenciando entre <text:span text:style-name="Strong_20_Emphasis"><text:span text:style-name="T4">clientes</text:span></text:span> y <text:span text:style-name="Strong_20_Emphasis"><text:span text:style-name="T4">entrenadores personales</text:span></text:span>.<text:line-break/>Cada usuario podrá acceder a su cuenta para consultar su progreso, mientras que los entrenadores tendrán acceso a las rutinas de sus clientes y podrán crear o modificar ejercicios personalizados.<text:line-break/>De esta forma, se garantiza un control básico de usuarios dentro del sistema y se cubre el módulo de <text:span text:style-name="Strong_20_Emphasis"><text:span text:style-name="T4">Sistemas de Gestión Empresarial</text:span></text:span> mediante la administración de datos y roles de usuario. </text:p>
            </text:list-item>
          </text:list>
        </text:list-item>
      </text:list>
      <text:p text:style-name="P21"/>
      <text:list text:continue-numbering="true" text:style-name="L9">
        <text:list-item>
          <text:p text:style-name="P27">Gestión de incidencias.</text:p>
          <text:list>
            <text:list-item>
              <text:p text:style-name="P29">Implícito en el control de usuarios y la gestión de la actividad de los mismos.</text:p>
            </text:list-item>
          </text:list>
        </text:list-item>
      </text:list>
      <text:p text:style-name="Text_20_body"/>
      <text:list text:continue-numbering="true" text:style-name="L9">
        <text:list-item>
          <text:p text:style-name="P27">Generación de informes de actividad.</text:p>
          <text:list>
            <text:list-item>
              <text:p text:style-name="P28">La aplicación generará <text:span text:style-name="Strong_20_Emphasis"><text:span text:style-name="T4">informes de actividad</text:span></text:span> para que el usuario pueda <text:span text:style-name="Strong_20_Emphasis"><text:span text:style-name="T4">visualizar su progreso en el gimnasio</text:span></text:span>.<text:line-break/>Estos informes incluirán datos como los <text:span text:style-name="Strong_20_Emphasis"><text:span text:style-name="T4">pesos utilizados</text:span></text:span>, <text:span text:style-name="Strong_20_Emphasis"><text:span text:style-name="T4">número de repeticiones</text:span></text:span>, <text:span text:style-name="Strong_20_Emphasis"><text:span text:style-name="T4">duración de los entrenamientos</text:span></text:span> y <text:span text:style-name="Strong_20_Emphasis"><text:span text:style-name="T4">frecuencia semanal de ejercicio</text:span></text:span>.<text:line-break/>A partir de esta información, se mostrarán <text:span text:style-name="Strong_20_Emphasis"><text:span text:style-name="T4">gráficos y resúmenes</text:span></text:span> que ayudarán al usuario a <text:span text:style-name="Strong_20_Emphasis"><text:span text:style-name="T4">evaluar su rendimiento</text:span></text:span>, <text:span text:style-name="Strong_20_Emphasis"><text:span text:style-name="T4">detectar mejoras</text:span></text:span> y <text:span text:style-name="Strong_20_Emphasis"><text:span text:style-name="T4">mantener la motivación</text:span></text:span> en su rutina. </text:p>
            </text:list-item>
          </text:list>
        </text:list-item>
      </text:list>
      <text:p text:style-name="Text_20_body"/>
      <text:list text:continue-numbering="true" text:style-name="L9">
        <text:list-item>
          <text:p text:style-name="P27">Panel de control básico (dashboard).</text:p>
          <text:list>
            <text:list-item>
              <text:p text:style-name="P28">El proyecto incluirá un panel de control básico que ofrezca un resumen del progreso personal.</text:p>
            </text:list-item>
          </text:list>
        </text:list-item>
      </text:list>
      <text:p text:style-name="P21"/>
      <text:p text:style-name="P21"/>
      <text:p text:style-name="P3">Sostenibilidad Aplicada al Sistema Productivo</text:p>
      <text:p text:style-name="P3"/>
      <text:list text:style-name="L10">
        <text:list-item>
          <text:p text:style-name="P30">El proyecto debe estar vinculado a algún Objetivo de Desarrollo Sostenible (ODS).</text:p>
          <text:list>
            <text:list-item>
              <text:p text:style-name="P31"><text:soft-page-break/>La aplicación está alineada con el Objetivo de Desarrollo Sostenible número 3: Salud y Bienestar.</text:p>
            </text:list-item>
          </text:list>
        </text:list-item>
      </text:list>
      <text:p text:style-name="P21"/>
      <text:list text:continue-numbering="true" text:style-name="L10">
        <text:list-item>
          <text:p text:style-name="P30">Debe incluir medidas o funcionalidades que fomenten la sostenibilidad (ej.: ahorro de recursos, movilidad sostenible, gestión de residuos, protección de la biodiversidad).</text:p>
          <text:list>
            <text:list-item>
              <text:p text:style-name="P32">La aplicación tendrá un impacto directo al<text:span text:style-name="T4"> fomentar un estilo de vida más saludable , contribuyendo a mejorar la salud física de los individuos y promueve hábitos saludables.</text:span></text:p>
            </text:list-item>
          </text:list>
        </text:list-item>
      </text:list>
      <text:p text:style-name="P21"/>
      <text:list text:continue-numbering="true" text:style-name="L10">
        <text:list-item>
          <text:p text:style-name="P30">Incorporar principios que reduzcan el impacto a lo largo del ciclo de vida del proyecto (eficiencia, reutilización, minimización de residuos).</text:p>
          <text:list>
            <text:list-item>
              <text:p text:style-name="P32"><text:span text:style-name="T4">La aplicación se diseña teniendo en cuenta </text:span><text:span text:style-name="Strong_20_Emphasis"><text:span text:style-name="T4">principios que reducen el impacto a lo largo de su ciclo de vida</text:span></text:span><text:span text:style-name="T4">.<text:line-break/>Al funcionar como un </text:span><text:span text:style-name="Strong_20_Emphasis"><text:span text:style-name="T4">cuaderno digital de entrenamiento</text:span></text:span><text:span text:style-name="T4">, elimina la necesidad de usar papel o varias herramientas físicas, ayudando así a </text:span><text:span text:style-name="Strong_20_Emphasis"><text:span text:style-name="T4">minimizar residuos y ahorrar recursos</text:span></text:span><text:span text:style-name="T4">.<text:line-break/>Además, se busca la </text:span><text:span text:style-name="Strong_20_Emphasis"><text:span text:style-name="T4">eficiencia</text:span></text:span><text:span text:style-name="T4"> mediante un código optimizado que reduzca el consumo de recursos del sistema, y la </text:span><text:span text:style-name="Strong_20_Emphasis"><text:span text:style-name="T4">reutilización</text:span></text:span><text:span text:style-name="T4"> de componentes de software, lo que facilita el mantenimiento y futuras mejoras sin necesidad de rehacer el proyecto desde cero.</text:span></text:p>
              <text:p text:style-name="P3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8:27:13.243784300</meta:creation-date>
    <dc:date>2026-02-20T16:47:18.933215000</dc:date>
    <meta:editing-duration>PT2H8M56S</meta:editing-duration>
    <meta:editing-cycles>46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74" meta:word-count="1591" meta:character-count="10275" meta:non-whitespace-character-count="8798"/>
  </office:meta>
</office:document-meta>
</file>