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officeooo:rsid="0005e350"/>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5e350"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officeooo:rsid="0013d1ba" style:font-size-asian="10.5pt" style:font-size-complex="12pt"/>
    </style:style>
    <style:style style:name="T6" style:family="text">
      <style:text-properties fo:font-size="12pt" fo:font-weight="bold" style:font-size-asian="10.5pt" style:font-size-complex="12pt"/>
    </style:style>
    <style:style style:name="T7" style:family="text">
      <style:text-properties fo:font-size="12pt" fo:font-weight="bold" officeooo:rsid="0013d1ba" style:font-size-asian="10.5pt" style:font-size-complex="12pt"/>
    </style:style>
    <style:style style:name="T8" style:family="text">
      <style:text-properties fo:font-size="12pt" fo:font-style="italic" fo:font-weight="normal" style:font-size-asian="10.5pt" style:font-weight-asian="normal" style:font-size-complex="12pt" style:font-weight-complex="normal"/>
    </style:style>
    <style:style style:name="T9" style:family="text">
      <style:text-properties fo:font-size="12pt" fo:font-style="italic" style:font-size-asian="10.5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style:style>
    <style:style style:name="T14" style:family="text">
      <style:text-properties officeooo:rsid="00149482"/>
    </style:style>
    <style:style style:name="T15" style:family="text">
      <style:text-properties style:text-underline-style="solid" style:text-underline-width="auto" style:text-underline-color="font-color"/>
    </style:style>
    <style:style style:name="T16" style:family="text">
      <style:text-properties officeooo:rsid="001ad0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puesta de proyecto intermodular</text:p>
      <text:p text:style-name="Standard"/>
      <text:p text:style-name="P1">Descripción</text:p>
      <text:p text:style-name="Standard"/>
      <text:p text:style-name="Standard"><text:span text:style-name="T3">Mi proyecto consistiría en una aplicación para poder llevar un seguimiento de los avances en nuestro físico. </text:span>La aplicación contará con un calendario para programar y visualizar los entrenamientos y las comidas registradas <text:span text:style-name="T1">junto</text:span><text:span text:style-name="T3"> con rutinas predefinidas para principiantes todo esto, también dispondría de un apartado para apuntar los pesos utilizados en entrenamientos anteriores y las medidas del cuerpo en caso de querer conocerlas.</text:span></text:p>
      <text:p text:style-name="Standard"/>
      <text:p text:style-name="Standard"/>
      <text:p text:style-name="P1">Justificación del impacto social o ambiental, problema que resuelve.</text:p>
      <text:p text:style-name="Standard"/>
      <text:p text:style-name="Standard"><text:span text:style-name="T2">Mi proyecto consiste en una aplicación que busca solucionar un problema común en el ámbito del bienestar personal: la falta de una herramienta centralizada y accesible para el seguimiento de la salud y el </text:span><text:span text:style-name="T8">fitness</text:span><text:span text:style-name="T2">. La aplicación facilitará que las personas inicien y mantengan un cambio físico, mejorando así su salud general.</text:span></text:p>
      <text:p text:style-name="Standard"/>
      <text:p text:style-name="Standard">Actualmente, los usuarios se ven obligados a utilizar múltiples aplicaciones, para registrar sus entrenamientos, contar calorías y registrar medidas corporales. Esta fragmentación de la información dificulta tener una visión clara del progreso. Además, la aplicación aborda la barrera que enfrentan los principiantes al carecer de conocimiento sobre cómo empezar, resolviendo este problema al ofrecer rutinas predefinidas. Por último, al permitir a los usuarios registrar y visualizar su progreso de manera sencilla a través de un calendario, la aplicación combate la falta de motivación y consistencia.</text:p>
      <text:p text:style-name="Standard">De esta manera, la aplicación tendrá un impacto directo al fomentar un estilo de vida más saludable. Esto se alinea con el Objetivo de Desarrollo Sostenible (ODS) número 3: Salud y Bienestar, ya que contribuye a mejorar la salud física de los individuos y promueve hábitos saludables.</text:p>
      <text:p text:style-name="Standard">Usuarios a los que está dirigido</text:p>
      <text:p text:style-name="Standard"/>
      <text:p text:style-name="Standard">Esta aplicación esta diseñada para cualquier usuario que quiera mejorar su fisico o su alimentacion, independientemente de si es un principiante o un usario con mas experiencia.</text:p>
      <text:p text:style-name="Standard"/>
      <text:p text:style-name="Standard">Para los principiantes, la aplicación resuelve el problema de "no saber por dónde empezar", ofreciéndoles un punto de partida claro con rutinas predefinidas y un sistema de seguimiento intuitivo que fomenta la consistencia desde el primer día.</text:p>
      <text:p text:style-name="Standard">Para los usuarios con más experiencia, la aplicación sirve como un cuaderno de bitácora digital. Les permite registrar con precisión sus entrenamientos, contar calorías para optimizar su nutrición y apuntar medidas corporales para monitorizar su progreso de forma detallada, lo cual es fundamental para alcanzar metas más específicas como ganar masa muscular o perder grasa.</text:p>
      <text:p text:style-name="Standard"/>
      <text:p text:style-name="P1">Identificación de los módulos implicados y su contribución.</text:p>
      <text:p text:style-name="Standard"/>
      <text:p text:style-name="Standard"/>
      <text:p text:style-name="Standard">La aplicación tiene una implementación de una base de datos relacional con al menos cuatro tablas interrelacionadas Usuarios, Rutinas, Alimentos y Medidas Corporales. Para el Desarrollo de Interfaces, se diseñará una GUI clara <text:span text:style-name="T14">y sencilla</text:span> con menús coherentes <text:span text:style-name="T14">e intuitivos</text:span>. Se generarán informes con gráficos para que el usuario pueda ver su progreso de forma visual.</text:p>
      <text:p text:style-name="Standard">Para el módulo de Programación Multimedia y Móviles, la aplicación tendrá un diseño adaptable que permitirá su uso tanto en teléfonos móviles como en ordenadores. La Programación de Servicios y Procesos se encargará de la comunicación cliente-servidor. También se aplicarán criterios de seguridad básicos como el cifrado de contraseñas.</text:p>
      <text:p text:style-name="Standard"><text:soft-page-break/>El proyecto también cubrirá el módulo de Sistemas de Gestión Empresarial a través del control de usuarios, la generación de informes de actividad y un panel de control básico que ofrezca un resumen del progreso personal. Finalmente, la aplicación está alineada con el ODS 3: Salud y Bienestar. A través de su uso, se fomenta un estilo de vida saludable.</text:p>
      <text:p text:style-name="P1"/>
      <text:p text:style-name="P1">Previsión de datos, pantallas y tecnologías a utilizar.</text:p>
      <text:p text:style-name="Standard"/>
      <text:p text:style-name="P2">El proyecto gestionará la información del usuario a través de una base de datos. Los principales datos que se almacenarán incluyen la información personal del usuario, los detalles de sus rutinas de ejercicio, un registro de su alimentación y sus medidas corporales, así como un historial de su actividad física.</text:p>
      <text:p text:style-name="P2">La aplicación se estructurará en varias pantallas, diseñadas para una navegación intuitiva y accesible en cualquier dispositivo. Se contará con un Panel de Control que mostrará un resumen del progreso del usuario. Habrá pantallas dedicadas para la gestión de Rutinas, el Registro de Alimentos, el seguimiento de Medidas y la visualización de Informes y Gráficos.</text:p>
      <text:p text:style-name="Standard"><text:span text:style-name="T12">Para el desarrollo del proyecto, se proponen tecnologías que se adaptan a un entorno multiplataforma. </text:span>Para el <text:span text:style-name="T13">backend</text:span> se utilizará un lenguaje de programación <text:span text:style-name="T16">de los utilizados en clase.</text:span> El <text:span text:style-name="T13">frontend</text:span> se desarrollará con un <text:span text:style-name="T13">framework</text:span> que permita la compatibilidad con <text:span text:style-name="T12">PC y móvil</text:span> a través de un <text:span text:style-name="T12">diseño adaptable.</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9:18:50.951123569</meta:creation-date>
    <dc:date>2025-09-19T17:47:02.747345351</dc:date>
    <meta:editing-duration>PT1H47M34S</meta:editing-duration>
    <meta:editing-cycles>14</meta:editing-cycles>
    <meta:generator>LibreOffice/24.2.7.2$Linux_X86_64 LibreOffice_project/420$Build-2</meta:generator>
    <meta:document-statistic meta:table-count="0" meta:image-count="0" meta:object-count="0" meta:page-count="2" meta:paragraph-count="19" meta:word-count="723" meta:character-count="4737" meta:non-whitespace-character-count="4033"/>
  </office:meta>
</office:document-meta>
</file>